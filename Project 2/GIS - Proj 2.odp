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7000001A54B37271D.png" manifest:media-type="image/png"/>
  <manifest:file-entry manifest:full-path="Pictures/10000001000001DD000002251161F5D4.png" manifest:media-type="image/png"/>
  <manifest:file-entry manifest:full-path="Pictures/10000001000005B50000035F693CB251.png" manifest:media-type="image/png"/>
  <manifest:file-entry manifest:full-path="Pictures/1000000100000174000001BCA01A83A0.png" manifest:media-type="image/png"/>
  <manifest:file-entry manifest:full-path="Pictures/10000001000001220000009ADBA75B77.png" manifest:media-type="image/png"/>
  <manifest:file-entry manifest:full-path="Pictures/100000010000018F00000171EC708777.png" manifest:media-type="image/png"/>
  <manifest:file-entry manifest:full-path="Pictures/10000001000001810000005178A7D52B.png" manifest:media-type="image/png"/>
  <manifest:file-entry manifest:full-path="Pictures/100000010000011E000000DC3F6062B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4.61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1.981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left" style:text-autospace="ideograph-alpha" style:punctuation-wrap="hanging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612cm" svg:x="1cm" svg:y="4.968cm" presentation:class="title" presentation:user-transformed="true">
          <draw:text-box>
            <text:p text:style-name="P1"><text:span text:style-name="T1"><text:s text:c="2"/>OGC Geospatial Web Services <text:s/>- креирање pygeoapi апликације за регион Нордхоланд ( Холандија )</text:span></text:p>
          </draw:text-box>
        </draw:frame>
        <draw:frame presentation:style-name="pr2" draw:text-style-name="P3" draw:layer="layout" svg:width="8.835cm" svg:height="1.981cm" svg:x="19.181cm" svg:y="13.636cm">
          <draw:text-box>
            <text:p>Ђорђе Петровић 2103</text:p>
          </draw:text-box>
        </draw:frame>
        <draw:frame presentation:style-name="pr2" draw:text-style-name="P3" draw:layer="layout" svg:width="8.835cm" svg:height="1.981cm" svg:x="-1.019cm" svg:y="13.636cm">
          <draw:text-box>
            <text:p>ГИС – 2.пројека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глед пројекта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Идеја другог пројекат јесте да се узме решење из првог пројекта и надогради тако што бисмо креирали pygeoapi бекенд апликације и упарили бисмо је са leaflet фронтендом апликацијом.</text:p>
              </text:list-item>
              <text:list-item>
                <text:p>На тај начин податке које смо раније гледали у QGIS програму сада ћемо моћи да искористимо у нашој апликацији и моћи ћемо на много природнији начин да конзумирамо те податке и манипулишемо с њима касније у трећем пројекту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Технологије и ресурси који су искоришћени<text:tab/>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penStreetMap – примарни извор података</text:p>
              </text:list-item>
              <text:list-item>
                <text:p>PostgreSQL – база података коју користимо за складиштење података</text:p>
              </text:list-item>
              <text:list-item>
                <text:p>PostGIS – екстензија која нам дозвољава да наша база података може адекватно да чува и рукује просторним подацима</text:p>
              </text:list-item>
              <text:list-item>
                <text:p>Pygeoapi – бекенд наше апликације који заправо представља посредника између PostGIS-a и Leaflet фронтенда</text:p>
              </text:list-item>
              <text:list-item>
                <text:p>Leaflet – Web мапа</text:p>
              </text:list-item>
              <text:list-item>
                <text:p>HTML/JavaScript/CSS – фронтенд апликације који конзумира податке који нам pygeoapi сервир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Подаци који су коришћени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Сврха пројекта 2 јесте да се пређе из обичне базе података која само чувају податке у праву (мини) апликацију која нам даје приступ мапи као и визуелизацији података на мапи у виду слојева, при чему имамо 7 основних слојева и 6 слојева који представљају наше упите.</text:p>
              </text:list-item>
              <text:list-item>
                <text:p>Подаци коришћени у овој апликацији су исти подаци које смо ускладишили у нашу PostGIS базу података у пројекту 1. </text:p>
              </text:list-item>
              <text:list-item>
                <text:p>Идеја је да се на мапи покажу просторни подаци noordholland регије у Холандији. </text:p>
              </text:list-item>
              <text:list-item>
                <text:p>Податке које смо увезли су школе, здравствене установе, улице, зграде, водени путеви (waterways), административни окрузи као и зелене површин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Подаци који су коришћени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Контрола приступа нашој бази података врши се преко .yml конфигурационог фајла. Обично се фајл зове pygeoapi-config.yml, у мом случају направљена у custom конфигурација у фајлу example-config.yml и тај фајл се користи за контролу приступа.</text:p>
              </text:list-item>
              <text:list-item>
                <text:p>У конфигурационом фајлу, у секцији resources дефинисали смо све табеле или упите које наша апликација може да користи. </text:p>
              </text:list-item>
              <text:list-item>
                <text:p>У случају обичних табела не мора ништа додатно да се уради већ само да се дефинише табела у конфиг фајлу, али је креирање индекса пожељно ради ефикасније претраге.</text:p>
              </text:list-item>
              <text:list-item>
                <text:p>У случају упита, не можемо директно да их наведемо као ресурсе већ је потребно пре тога у PostGIS бази података дефинисати view-ове који представљају те упите и затим навести у resource секцији те view-ове као табел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Примери view-ева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<text:span text:style-name="T2">Као што можемо видети, у нашој бази података дефинисали </text:span><text:span text:style-name="T2"><text:line-break/></text:span><text:span text:style-name="T2">смо посебан view за сваки упит, али иза сваку табелу.</text:span></text:p>
              </text:list-item>
              <text:list-item>
                <text:p text:style-name="P5"><text:span text:style-name="T2">Разлог за креирање view-ева за табеле јесте зато што табеле</text:span><text:span text:style-name="T2"><text:line-break/></text:span><text:span text:style-name="T2">имају само osm_id, osm_type, geom и tags секцију.</text:span></text:p>
              </text:list-item>
              <text:list-item>
                <text:p text:style-name="P5"><text:span text:style-name="T2">Проблем са овим јесте то што је за наш пројекат</text:span><text:span text:style-name="T2"><text:line-break/></text:span><text:span text:style-name="T2">потребно да представимо разне податке за </text:span><text:span text:style-name="T2"><text:line-break/></text:span><text:span text:style-name="T2">сваки објекат, али они су ’’закључани’’ у tags</text:span><text:span text:style-name="T2"><text:line-break/></text:span><text:span text:style-name="T2">колони и морају да се екстрактују одатле и </text:span><text:span text:style-name="T2"><text:line-break/></text:span><text:span text:style-name="T2">креирају засебне колоне са тим подацима. </text:span></text:p>
              </text:list-item>
              <text:list-item>
                <text:p text:style-name="P5"><text:span text:style-name="T2">View нам управо ово омогућава због чега је и</text:span><text:span text:style-name="T2"><text:line-break/></text:span><text:span text:style-name="T2">креиран view за сваку табелу.</text:span></text:p>
              </text:list-item>
            </text:list>
          </draw:text-box>
        </draw:frame>
        <draw:frame draw:style-name="gr2" draw:text-style-name="P6" draw:layer="layout" svg:width="8.361cm" svg:height="9.623cm" svg:x="19.05cm" svg:y="4.502cm">
          <draw:image xlink:href="Pictures/10000001000001DD000002251161F5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пликација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На основу текста задатка развијено је пар функционалности у на фронтенд страни апликације међу којима су легенда, слојеви ( табеле и упити ), као и приказ података кликом на геоподатак.</text:p>
              </text:list-item>
              <text:list-item>
                <text:p>Додатна функционалност која је такође развијена, а која ће бити такође потребна у пројекту 3 јесте могућност укључивања/искључивања слојева кликом на слој тј. Чекбокса поред слој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Легенда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Легенда је вероватно била и најједноставнија</text:span><text:span text:style-name="T3"><text:line-break/></text:span><text:span text:style-name="T3">функционалност за развијање</text:span></text:p>
              </text:list-item>
              <text:list-item>
                <text:p><text:span text:style-name="T3">У питању је правоугаоник који узима наше</text:span><text:span text:style-name="T3"><text:line-break/></text:span><text:span text:style-name="T3">податке из листе слојева које садрже имена</text:span><text:span text:style-name="T3"><text:line-break/></text:span><text:span text:style-name="T3">табела/упита, лабелу која се појављује као </text:span><text:span text:style-name="T3"><text:line-break/></text:span><text:span text:style-name="T3">назив ових слојева, али и боју која представља</text:span><text:span text:style-name="T3"><text:line-break/></text:span><text:span text:style-name="T3">геоподатке из те групе података</text:span></text:p>
              </text:list-item>
              <text:list-item>
                <text:p><text:span text:style-name="T3">На основу наше листе динамички се креира</text:span><text:span text:style-name="T3"><text:line-break/></text:span><text:span text:style-name="T3">легенда која служи за препознавање раличитих</text:span><text:span text:style-name="T3"><text:line-break/></text:span><text:span text:style-name="T3">типова геоподатака</text:span></text:p>
              </text:list-item>
            </text:list>
          </draw:text-box>
        </draw:frame>
        <draw:frame draw:style-name="gr2" draw:text-style-name="P6" draw:layer="layout" svg:width="7.446cm" svg:height="8.888cm" svg:x="18.589cm" svg:y="5.08cm">
          <draw:image xlink:href="Pictures/1000000100000174000001BCA01A83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Слојеви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<text:span text:style-name="T4">Као што можемо видети на слици, слојеви</text:span><text:span text:style-name="T4"><text:line-break/></text:span><text:span text:style-name="T4">могу да се укључују/искључују</text:span></text:p>
              </text:list-item>
              <text:list-item>
                <text:p><text:span text:style-name="T4">Такође битно је напоменути да се због </text:span><text:span text:style-name="T4"><text:line-break/></text:span><text:span text:style-name="T4">количине података слојеви учитавају</text:span><text:span text:style-name="T4"><text:line-break/></text:span><text:span text:style-name="T4">секвенцијално, што значи да сваки пут</text:span><text:span text:style-name="T4"><text:line-break/></text:span><text:span text:style-name="T4">када укључимо нашу апликацију да се </text:span><text:span text:style-name="T4"><text:line-break/></text:span><text:span text:style-name="T4">редослед слојева мења јер је немогуће</text:span><text:span text:style-name="T4"><text:line-break/></text:span><text:span text:style-name="T4">предвидети који ће се прво учитати.</text:span></text:p>
              </text:list-item>
              <text:list-item>
                <text:p><text:span text:style-name="T4">Разлог за овакав начин функционисања је</text:span><text:span text:style-name="T4"><text:line-break/></text:span><text:span text:style-name="T4">због тога што поједине табеле имају чак и</text:span><text:span text:style-name="T4"><text:line-break/></text:span><text:span text:style-name="T4">380 хиљада редова, те је брзина обраде тих</text:span><text:span text:style-name="T4"><text:line-break/></text:span><text:span text:style-name="T4">података ограничен перформансама мог</text:span><text:span text:style-name="T4"><text:line-break/></text:span><text:span text:style-name="T4">лаптопа</text:span></text:p>
              </text:list-item>
            </text:list>
          </draw:text-box>
        </draw:frame>
        <draw:frame draw:style-name="gr2" draw:text-style-name="P6" draw:layer="layout" svg:width="10.557cm" svg:height="9.763cm" svg:x="17.145cm" svg:y="4.207cm">
          <draw:image xlink:href="Pictures/100000010000018F00000171EC7087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5">Приказ података о произвољном геоподатку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Кликом на произвољни геоподатак </text:span><text:span text:style-name="T4"><text:line-break/></text:span><text:span text:style-name="T4">можемо видети све кључне детаље </text:span><text:span text:style-name="T4"><text:line-break/></text:span><text:span text:style-name="T4">о тој тачки</text:span></text:p>
              </text:list-item>
              <text:list-item>
                <text:p><text:span text:style-name="T4">У нашем примеру кликнули само на</text:span><text:span text:style-name="T4"><text:line-break/></text:span><text:span text:style-name="T4">произвољну школу у северном делу </text:span><text:span text:style-name="T4"><text:line-break/></text:span><text:span text:style-name="T4">Холандије и могли смо да видимо </text:span><text:span text:style-name="T4"><text:line-break/></text:span><text:span text:style-name="T4">занимљиве детаље попут имена </text:span><text:span text:style-name="T4"><text:line-break/></text:span><text:span text:style-name="T4">школе, броја телефона, комплетне </text:span><text:span text:style-name="T4"><text:line-break/></text:span><text:span text:style-name="T4">адресе, као и тип школе.</text:span></text:p>
              </text:list-item>
            </text:list>
          </draw:text-box>
        </draw:frame>
        <draw:frame draw:style-name="gr2" draw:text-style-name="P6" draw:layer="layout" svg:width="10.132cm" svg:height="10.48cm" svg:x="17.173cm" svg:y="3.81cm">
          <draw:image xlink:href="Pictures/1000000100000197000001A54B3727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ример рада више слојева истовремено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6" draw:layer="layout" svg:width="22.86cm" svg:height="11.242cm" svg:x="2.54cm" svg:y="3.81cm">
          <draw:image xlink:href="Pictures/10000001000005B50000035F693CB2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6">Пример како је дефинисан један ресурс у pygeoapi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7">Пре саме обраде битно је напоменути да смо због смањења броја понављања истих података дошли до решења где се конекција са базом и bounding box дефинишу једном, а затим се само проследе свим дефиницијама ресурса у нашој pygeoapi апликацији</text:span></text:p>
              </text:list-item>
            </text:list>
          </draw:text-box>
        </draw:frame>
        <draw:frame draw:style-name="gr2" draw:text-style-name="P6" draw:layer="layout" svg:width="11.482cm" svg:height="6.097cm" svg:x="1.853cm" svg:y="7.873cm">
          <draw:image xlink:href="Pictures/10000001000001220000009ADBA75B77.png" xlink:type="simple" xlink:show="embed" xlink:actuate="onLoad" draw:mime-type="image/png">
            <text:p/>
          </draw:image>
        </draw:frame>
        <draw:frame draw:style-name="gr2" draw:text-style-name="P6" draw:layer="layout" svg:width="13.206cm" svg:height="2.777cm" svg:x="13.97cm" svg:y="9.288cm">
          <draw:image xlink:href="Pictures/10000001000001810000005178A7D5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6">Пример како је дефинисан један ресурс у pygeoapi</text:span>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7">Након што смо дефинисали конекцију и </text:span><text:span text:style-name="T7"><text:line-break/></text:span><text:span text:style-name="T7">bounding box можемо видети пример једне </text:span><text:span text:style-name="T7"><text:line-break/></text:span><text:span text:style-name="T7">дефиниције ресурса</text:span></text:p>
              </text:list-item>
              <text:list-item>
                <text:p text:style-name="P7"><text:span text:style-name="T7">Битно је напоменути да је ово минималан </text:span><text:span text:style-name="T7"><text:line-break/></text:span><text:span text:style-name="T7">сет података који морамо имати за било </text:span><text:span text:style-name="T7"><text:line-break/></text:span><text:span text:style-name="T7">који ресурс и без овога неће нам бити </text:span><text:span text:style-name="T7"><text:line-break/></text:span><text:span text:style-name="T7">доступан ресурс.</text:span></text:p>
              </text:list-item>
            </text:list>
          </draw:text-box>
        </draw:frame>
        <draw:frame draw:style-name="gr2" draw:text-style-name="P6" draw:layer="layout" svg:width="10.733cm" svg:height="9.525cm" svg:x="16.51cm" svg:y="4.445cm">
          <draw:image xlink:href="Pictures/100000010000011E000000DC3F6062B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Закључак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8">У оквиру пројекта успешно је имплементиран веб ГИС систем који користи OpenStreetMap податке из PostGIS базе и OGC стандардне веб сервисе преко pygeoapi. Развијена је једноставна Leaflet веб апликација за приказ векторских и растерских слојева, као и приказ атрибута и основних просторних упит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2T23:04:24.974463400</meta:creation-date>
    <dc:description>This work is licensed under a Creative Commons 0 License.
It makes use of the works of Jun NOGATA.</dc:description>
    <meta:generator>LibreOffice/26.2.4.2$Windows_X86_64 LibreOffice_project/0229ac93fcf0d7cbc6376066c6f35021cef002dc</meta:generator>
    <dc:title>Midnightblue</dc:title>
    <meta:editing-duration>PT2H1M38S</meta:editing-duration>
    <meta:editing-cycles>14</meta:editing-cycles>
    <dc:date>2026-06-30T16:29:40.874531600</dc:date>
    <meta:document-statistic meta:object-count="115"/>
  </office:meta>
</office:document-meta>
</file>